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3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5cm" fo:padding-left="0.3cm" fo:padding-right="0.3cm" fo:padding-top="0.15cm" style:vertical-align="middle"/>
    </style:style>
    <style:style style:name="ce35" style:family="table-cell" style:parent-style-name="Default">
      <style:table-cell-properties fo:background-color="#b4c7dc" style:text-align-source="fix" style:repeat-content="false" fo:padding-bottom="0.15cm" fo:padding-left="0.3cm" fo:padding-right="0.3cm" fo:padding-top="0.15cm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padding-bottom="0.15cm" fo:padding-left="0.3cm" fo:padding-right="0.3cm" fo:padding-top="0.15cm" style:rotation-angle="90" style:vertical-align="middl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padding-bottom="0.15cm" fo:padding-left="0.3cm" fo:padding-right="0.3cm" fo:padding-top="0.15cm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9" style:family="table-cell" style:parent-style-name="Default">
      <style:table-cell-properties fo:padding-bottom="0.15cm" fo:padding-left="0.3cm" fo:padding-right="0.3cm" fo:padding-top="0.15cm"/>
    </style:style>
    <style:style style:name="ce54" style:family="table-cell" style:parent-style-name="Default">
      <style:table-cell-properties style:text-align-source="fix" style:repeat-content="false" fo:padding-bottom="0.15cm" fo:padding-left="0.3cm" fo:padding-right="0.3cm" fo:padding-top="0.15cm" style:vertical-align="automatic"/>
      <style:paragraph-properties fo:text-align="center" fo:margin-left="0cm"/>
      <style:text-properties fo:font-size="16pt" style:font-size-asian="16pt" style:font-size-complex="16pt"/>
    </style:style>
    <style:style style:name="ce55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99999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padding-bottom="0.15cm" fo:padding-left="0.3cm" fo:padding-right="0.3cm" fo:padding-top="0.15cm"/>
    </style:style>
    <style:style style:name="ce58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ffff00" fo:padding-bottom="0.15cm" fo:padding-left="0.3cm" fo:padding-right="0.3cm" fo:padding-top="0.15cm" style:vertical-align="middle"/>
      <style:text-properties fo:font-size="13pt" style:font-size-asian="13pt" style:font-size-complex="13pt"/>
    </style:style>
    <style:style style:name="ce59" style:family="table-cell" style:parent-style-name="Default">
      <style:table-cell-properties fo:background-color="#ffff6d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afd095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ffffa6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74pt solid #000000" fo:background-color="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ffffa6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dee6ef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7d7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ffd7d7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padding-bottom="0.15cm" fo:padding-left="0.3cm" fo:padding-right="0.3cm" fo:padding-top="0.15cm" style:vertical-align="middl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ackground-color="#dee6ef"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dee6ef"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38" style:text-align-source="fix" style:repeat-content="false" fo:border="1.5pt solid #000000" fo:padding-bottom="0.15cm" fo:padding-left="0.3cm" fo:padding-right="0.3cm" fo:padding-top="0.1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000000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color="#ffff38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1" style:family="graphic">
      <style:graphic-properties svg:stroke-width="0.1cm" svg:stroke-color="#f10d0c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in Visibility" table:style-name="ta1" table:print-ranges="'Chain Visibility'.B2:'Chain Visibility'.I12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default-cell-style-name="ce1"/>
        <table:table-column table:style-name="co5" table:number-columns-repeated="1012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- Visibility of Chains Within Each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Letter @ 100%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4" calcext:value-type="string">
            <text:p>v 0.4</text:p>
          </table:table-cell>
          <table:table-cell table:style-name="ce9" table:number-columns-repeated="5"/>
          <table:table-cell table:style-name="ce58" table:formula="of:=[$'Targets Permitted - Format 1'.I3]" office:value-type="string" office:string-value="E. Marceau – 2026-07-10" calcext:value-type="string">
            <text:p>E. Marceau – 2026-07-1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53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6" office:value-type="string" calcext:value-type="string">
            <text:p>Access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4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6" office:value-type="string" calcext:value-type="string">
            <text:p>Access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OUTPUT</text:p>
          </table:table-cell>
          <table:table-cell table:number-columns-repeated="5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EJECT or DROP" table:style-name="ta1" table:print-ranges="'REJECT or DROP'.B2:'REJECT or DROP'.I12"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default-cell-style-name="ce1"/>
        <table:table-column table:style-name="co5" table:number-columns-repeated="1012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- Allowed use of REJECT and DROP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Letter @ 100%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4" calcext:value-type="string">
            <text:p>v 0.4</text:p>
          </table:table-cell>
          <table:table-cell table:style-name="ce9" table:number-columns-repeated="5"/>
          <table:table-cell table:style-name="ce58" table:formula="of:=[$'Targets Permitted - Format 1'.I3]" office:value-type="string" office:string-value="E. Marceau – 2026-07-10" calcext:value-type="string">
            <text:p>E. Marceau – 2026-07-1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9" office:value-type="string" calcext:value-type="string">
            <text:p>DROP</text:p>
          </table:table-cell>
          <table:table-cell table:style-name="ce57"/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OUTPUT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argets Permitted - Format 1" table:style-name="ta1" table:print-ranges="'Targets Permitted - Format 1'.B2:'Targets Permitted - Format 1'.I80"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default-cell-style-name="ce1"/>
        <table:table-column table:style-name="co5" table:number-columns-repeated="1012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Allowed Targets for Chains by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Tabloid @ Fit</text:p>
            <text:p>1 pg wide</text:p>
            <text:p>1 pg hig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9" office:value-type="string" calcext:value-type="string">
            <text:p>v 0.4</text:p>
          </table:table-cell>
          <table:table-cell table:number-columns-repeated="5"/>
          <table:table-cell table:style-name="ce58" office:value-type="string" calcext:value-type="string">
            <text:p>E. Marceau – 2026-07-1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1">
          <table:table-cell/>
          <table:table-cell table:style-name="ce36" office:value-type="string" calcext:value-type="string" table:number-columns-spanned="1" table:number-rows-spanned="74">
            <text:p>↞ <text:s text:c="2"/>Chain <text:s text:c="2"/>↠</text:p>
          </table:table-cell>
          <table:table-cell table:style-name="ce24" office:value-type="string" calcext:value-type="string" table:number-columns-spanned="1" table:number-rows-spanned="11">
            <text:p>PREROUTING</text:p>
          </table:table-cell>
          <table:table-cell table:style-name="ce38" office:value-type="string" calcext:value-type="string">
            <text:p>NOTRACK</text:p>
          </table:table-cell>
          <table:table-cell table:style-name="ce45" office:value-type="string" calcext:value-type="string">
            <text:p>MARK</text:p>
          </table:table-cell>
          <table:table-cell table:style-name="ce38" office:value-type="string" calcext:value-type="string">
            <text:p>DNA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style-name="ce57" table:number-columns-repeated="3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REROUTING</text:p>
          </table:covered-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table-cell table:style-name="ce25" office:value-type="string" calcext:value-type="string" table:number-columns-spanned="1" table:number-rows-spanned="13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REDIREC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57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style-name="ce57" table:number-columns-repeated="4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INPUT</text:p>
          </table:covered-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25" office:value-type="string" calcext:value-type="string" table:number-columns-spanned="1" table:number-rows-spanned="16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FORWARD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25" office:value-type="string" calcext:value-type="string" table:number-columns-spanned="1" table:number-rows-spanned="16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style-name="ce57" table:number-columns-repeated="5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OUTPUT</text:p>
          </table:covered-table-cell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25" office:value-type="string" calcext:value-type="string" table:number-columns-spanned="1" table:number-rows-spanned="18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57" table:number-columns-repeated="2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/>
          <table:covered-table-cell/>
          <table:covered-table-cell table:style-name="ce24" office:value-type="string" calcext:value-type="string">
            <text:p>POSTROUTING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 table:number-rows-repeated="1048494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argets Permitted - Format 2" table:style-name="ta1" table:print-ranges="'Targets Permitted - Format 2'.B117:'Targets Permitted - Format 2'.I194">
        <table:table-column table:style-name="co1" table:number-columns-repeated="2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 table:style-name="Default" table:number-columns-repeated="1023"/>
          <table:table-cell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4" calcext:value-type="string">
            <text:p>v 0.4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10" calcext:value-type="string">
            <text:p>E. Marceau – 2026-07-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PREROUTING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REROUTING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INPUT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REDIREC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57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3" table:style-name="ce40" office:value-type="string" calcext:value-type="string">
            <text:p>ACCEPT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3" table:style-name="ce40" office:value-type="string" calcext:value-type="string">
            <text:p>DROP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FORWARD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POSTROUTING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57" table:number-columns-repeated="2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4" calcext:value-type="string">
            <text:p>v 0.4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10" calcext:value-type="string">
            <text:p>E. Marceau – 2026-07-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(Client Process)</text:p>
          </table:table-cell>
          <table:table-cell table:style-name="ce64" table:number-columns-repeated="8"/>
          <table:table-cell table:number-columns-repeated="1013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2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2"/>
          <table:table-cell table:number-columns-repeated="4" table:style-name="ce55" office:value-type="string" calcext:value-type="string">
            <text:p>INPUT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4" office:value-type="string" calcext:value-type="string">
            <text:p>REDIREC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NF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38" office:value-type="string" calcext:value-type="string">
            <text:p>TRACE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0" office:value-type="string" calcext:value-type="string">
            <text:p>DROP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Sending to Remote</text:p>
          </table:table-cell>
          <table:table-cell table:style-name="ce64"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5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5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11" table:number-rows-spanned="1">
            <text:p>Packet Destination: Passing Thru To Another Host</text:p>
          </table:table-cell>
          <table:covered-table-cell table:number-columns-repeated="10" table:style-name="ce64"/>
          <table:table-cell table:number-columns-repeated="1011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0"/>
          <table:table-cell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3"/>
          <table:table-cell table:number-columns-repeated="3" table:style-name="ce55" office:value-type="string" calcext:value-type="string">
            <text:p>FORWARD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45" office:value-type="string" calcext:value-type="string">
            <text:p>TCPMSS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5" office:value-type="string" calcext:value-type="string">
            <text:p>ECN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0" office:value-type="string" calcext:value-type="string">
            <text:p>QUEUE</text:p>
          </table:table-cell>
          <table:table-cell table:style-name="ce57" table:number-columns-repeated="2"/>
          <table:table-cell table:style-name="ce43"/>
          <table:table-cell table:style-name="ce57" table:number-columns-repeated="2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1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 table:number-rows-repeated="3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1" table:number-rows-repeated="1048264">
          <table:table-cell table:number-columns-repeated="1024"/>
        </table:table-row>
        <table:table-row table:style-name="ro4" table:number-rows-repeated="1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cal Host - Incoming Flow" table:style-name="ta1" table:print-ranges="'Local Host - Incoming Flow'.B2:'Local Host - Incoming Flow'.L24">
        <office:forms form:automatic-focus="false" form:apply-design-mode="false"/>
        <table:shapes>
          <draw:line draw:z-index="0" draw:name="Vertical line 1" draw:style-name="gr1" draw:text-style-name="P1" svg:x1="10.486cm" svg:y1="16.878cm" svg:x2="10.486cm" svg:y2="15.566cm">
            <text:p/>
          </draw:line>
        </table:shapes>
        <table:table-column table:style-name="co1" table:number-columns-repeated="2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style-name="ce18" office:value-type="string" calcext:value-type="string">
            <text:p>Tabloid @ 90%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4" calcext:value-type="string">
            <text:p>v 0.4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10" calcext:value-type="string">
            <text:p>E. Marceau – 2026-07-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(Client Process)</text:p>
          </table:table-cell>
          <table:table-cell table:style-name="ce64" table:number-columns-repeated="8"/>
          <table:table-cell table:number-columns-repeated="1013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2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2"/>
          <table:table-cell table:number-columns-repeated="4" table:style-name="ce55" office:value-type="string" calcext:value-type="string">
            <text:p>INPUT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table:style-name="ce10"/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4" office:value-type="string" calcext:value-type="string">
            <text:p>REDIREC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NF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38" office:value-type="string" calcext:value-type="string">
            <text:p>TRACE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0" office:value-type="string" calcext:value-type="string">
            <text:p>DROP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3"/>
        </table:table-row>
        <table:table-row table:style-name="ro5">
          <table:table-cell table:style-name="ce10"/>
          <table:table-cell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6">
          <table:table-cell table:style-name="ce10"/>
          <table:table-cell/>
          <table:table-cell table:style-name="ce39"/>
          <table:table-cell table:style-name="ce70" office:value-type="string" calcext:value-type="string" table:number-columns-spanned="2" table:number-rows-spanned="1">
            <text:p>Connection Tracking</text:p>
          </table:table-cell>
          <table:covered-table-cell/>
          <table:table-cell table:number-columns-repeated="3"/>
          <table:table-cell table:style-name="ce58"/>
          <table:table-cell table:number-columns-repeated="1015"/>
        </table:table-row>
        <table:table-row table:style-name="ro1" table:number-rows-repeated="4">
          <table:table-cell table:style-name="ce10"/>
          <table:table-cell table:number-columns-repeated="1023"/>
        </table:table-row>
        <table:table-row table:style-name="ro1" table:number-rows-repeated="1048332">
          <table:table-cell table:number-columns-repeated="1024"/>
        </table:table-row>
        <table:table-row table:style-name="ro4" table:number-rows-repeated="2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cal Host - Outgoing Flow" table:style-name="ta1" table:print-ranges="'Local Host - Outgoing Flow'.B2:'Local Host - Outgoing Flow'.L29">
        <office:forms form:automatic-focus="false" form:apply-design-mode="false"/>
        <table:shapes>
          <draw:line draw:z-index="0" draw:name="Vertical line 2" draw:style-name="gr1" draw:text-style-name="P1" svg:x1="10.498cm" svg:y1="19.887cm" svg:x2="10.498cm" svg:y2="18.575cm">
            <text:p/>
          </draw:line>
        </table:shapes>
        <table:table-column table:style-name="co1" table:number-columns-repeated="2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style-name="ce18" office:value-type="string" calcext:value-type="string">
            <text:p>Tabloid @ 90%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4" calcext:value-type="string">
            <text:p>v 0.4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10" calcext:value-type="string">
            <text:p>E. Marceau – 2026-07-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Sending to Remote</text:p>
          </table:table-cell>
          <table:table-cell table:style-name="ce64"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table:style-name="ce10"/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5"/>
          <table:table-cell table:style-name="ce43"/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5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5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3"/>
        </table:table-row>
        <table:table-row table:style-name="ro5">
          <table:table-cell table:style-name="ce10"/>
          <table:table-cell/>
          <table:table-cell table:style-name="ce39"/>
          <table:table-cell table:number-columns-repeated="5"/>
          <table:table-cell table:style-name="ce58"/>
          <table:table-cell/>
          <table:table-cell table:style-name="ce71" office:value-type="string" calcext:value-type="string">
            <text:p>Not relevant if</text:p>
            <text:p>dest = localhost</text:p>
          </table:table-cell>
          <table:table-cell table:number-columns-repeated="1013"/>
        </table:table-row>
        <table:table-row table:style-name="ro6">
          <table:table-cell table:style-name="ce10"/>
          <table:table-cell/>
          <table:table-cell table:style-name="ce39"/>
          <table:table-cell table:style-name="ce70" office:value-type="string" calcext:value-type="string" table:number-columns-spanned="2" table:number-rows-spanned="1">
            <text:p>Connection Tracking</text:p>
          </table:table-cell>
          <table:covered-table-cell/>
          <table:table-cell table:number-columns-repeated="3"/>
          <table:table-cell table:style-name="ce58"/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1048333">
          <table:table-cell table:number-columns-repeated="1024"/>
        </table:table-row>
        <table:table-row table:style-name="ro4" table:number-rows-repeated="2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ow Forwarded to Peer" table:style-name="ta1" table:print-ranges="'Flow Forwarded to Peer'.B2:'Flow Forwarded to Peer'.N29">
        <office:forms form:automatic-focus="false" form:apply-design-mode="false"/>
        <table:shapes>
          <draw:line draw:z-index="0" draw:name="Vertical line 3" draw:style-name="gr1" draw:text-style-name="P1" svg:x1="10.496cm" svg:y1="19.899cm" svg:x2="10.496cm" svg:y2="18.587cm">
            <text:p/>
          </draw:line>
        </table:shapes>
        <table:table-column table:style-name="co1" table:number-columns-repeated="2" table:default-cell-style-name="ce1"/>
        <table:table-column table:style-name="co2" table:default-cell-style-name="ce37"/>
        <table:table-column table:style-name="co4" table:number-columns-repeated="5" table:default-cell-style-name="ce10"/>
        <table:table-column table:style-name="co4" table:number-columns-repeated="5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08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style-name="ce18" office:value-type="string" calcext:value-type="string">
            <text:p>Tabloid @ 90%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4" calcext:value-type="string">
            <text:p>v 0.4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10" calcext:value-type="string">
            <text:p>E. Marceau – 2026-07-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11" table:number-rows-spanned="1">
            <text:p>Packet Destination: Passing Thru To Peer Host</text:p>
          </table:table-cell>
          <table:covered-table-cell table:number-columns-repeated="10" table:style-name="ce64"/>
          <table:table-cell table:number-columns-repeated="1010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0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3"/>
          <table:table-cell table:number-columns-repeated="3" table:style-name="ce55" office:value-type="string" calcext:value-type="string">
            <text:p>FORWARD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45" office:value-type="string" calcext:value-type="string">
            <text:p>TCPMSS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5" office:value-type="string" calcext:value-type="string">
            <text:p>ECN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0" office:value-type="string" calcext:value-type="string">
            <text:p>QUEUE</text:p>
          </table:table-cell>
          <table:table-cell table:style-name="ce57" table:number-columns-repeated="2"/>
          <table:table-cell table:style-name="ce43"/>
          <table:table-cell table:style-name="ce57" table:number-columns-repeated="2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0"/>
        </table:table-row>
        <table:table-row table:style-name="ro5">
          <table:table-cell table:style-name="ce10"/>
          <table:table-cell/>
          <table:table-cell table:style-name="ce39"/>
          <table:table-cell table:number-columns-repeated="5"/>
          <table:table-cell table:style-name="ce58"/>
          <table:table-cell table:number-columns-repeated="3"/>
          <table:table-cell table:style-name="ce71" office:value-type="string" calcext:value-type="string">
            <text:p>Not relevant if</text:p>
            <text:p>dest = localhost</text:p>
          </table:table-cell>
          <table:table-cell table:number-columns-repeated="1010"/>
        </table:table-row>
        <table:table-row table:style-name="ro6">
          <table:table-cell table:style-name="ce10"/>
          <table:table-cell/>
          <table:table-cell table:style-name="ce39"/>
          <table:table-cell table:style-name="ce70" office:value-type="string" calcext:value-type="string" table:number-columns-spanned="2" table:number-rows-spanned="1">
            <text:p>Connection Tracking</text:p>
          </table:table-cell>
          <table:covered-table-cell/>
          <table:table-cell table:number-columns-repeated="3"/>
          <table:table-cell table:style-name="ce58"/>
          <table:table-cell table:number-columns-repeated="1014"/>
        </table:table-row>
        <table:table-row table:style-name="ro1">
          <table:table-cell table:style-name="ce10"/>
          <table:table-cell table:number-columns-repeated="1022"/>
        </table:table-row>
        <table:table-row table:style-name="ro1" table:number-rows-repeated="1048333">
          <table:table-cell table:number-columns-repeated="1023"/>
        </table:table-row>
        <table:table-row table:style-name="ro4" table:number-rows-repeated="21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fo:page-width="27.94cm" fo:page-height="43.18cm" style:num-format="1" style:print-orientation="portrait" fo:margin-top="1.3cm" fo:margin-bottom="2cm" fo:margin-left="1.3cm" fo:margin-right="1.3cm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0T21:55:33.634968832</dc:date>
    <dc:creator>Eric Marceau</dc:creator>
    <meta:editing-duration>PT7H46M20S</meta:editing-duration>
    <meta:editing-cycles>79</meta:editing-cycles>
    <meta:generator>LibreOffice/7.3.4.2$Linux_X86_64 LibreOffice_project/728fec16bd5f605073805c3c9e7c4212a0120dc5</meta:generator>
    <meta:document-statistic meta:table-count="7" meta:cell-count="1280" meta:object-count="3"/>
  </office:meta>
</office:document-meta>
</file>