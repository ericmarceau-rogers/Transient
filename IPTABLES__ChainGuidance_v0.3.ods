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15cm" fo:padding-left="0.3cm" fo:padding-right="0.3cm" fo:padding-top="0.15cm" style:vertical-align="middle"/>
    </style:style>
    <style:style style:name="ce35" style:family="table-cell" style:parent-style-name="Default">
      <style:table-cell-properties fo:background-color="#b4c7dc" style:text-align-source="fix" style:repeat-content="false" fo:padding-bottom="0.15cm" fo:padding-left="0.3cm" fo:padding-right="0.3cm" fo:padding-top="0.15cm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style:text-align-source="fix" style:repeat-content="false" fo:padding-bottom="0.15cm" fo:padding-left="0.3cm" fo:padding-right="0.3cm" fo:padding-top="0.15cm" style:rotation-angle="90" style:vertical-align="middle"/>
      <style:paragraph-properties fo:text-align="center" fo:margin-left="0cm"/>
      <style:text-properties fo:font-size="16pt" style:font-size-asian="16pt" style:font-size-complex="16pt"/>
    </style:style>
    <style:style style:name="ce37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padding-bottom="0.15cm" fo:padding-left="0.3cm" fo:padding-right="0.3cm" fo:padding-top="0.15cm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b4c7dc" style:text-align-source="fix" style:repeat-content="false" fo:border="0.74pt solid #000000" fo:padding-bottom="0.15cm" fo:padding-left="0.3cm" fo:padding-right="0.3cm" fo:padding-top="0.15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center" fo:margin-left="0cm"/>
    </style:style>
    <style:style style:name="ce9" style:family="table-cell" style:parent-style-name="Default">
      <style:table-cell-properties fo:padding-bottom="0.15cm" fo:padding-left="0.3cm" fo:padding-right="0.3cm" fo:padding-top="0.15cm"/>
    </style:style>
    <style:style style:name="ce54" style:family="table-cell" style:parent-style-name="Default">
      <style:table-cell-properties style:text-align-source="fix" style:repeat-content="false" fo:padding-bottom="0.15cm" fo:padding-left="0.3cm" fo:padding-right="0.3cm" fo:padding-top="0.15cm" style:vertical-align="automatic"/>
      <style:paragraph-properties fo:text-align="center" fo:margin-left="0cm"/>
      <style:text-properties fo:font-size="16pt" style:font-size-asian="16pt" style:font-size-complex="16pt"/>
    </style:style>
    <style:style style:name="ce55" style:family="table-cell" style:parent-style-name="Default">
      <style:table-cell-properties fo:background-color="#b4c7dc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999999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padding-bottom="0.15cm" fo:padding-left="0.3cm" fo:padding-right="0.3cm" fo:padding-top="0.15cm"/>
    </style:style>
    <style:style style:name="ce58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ackground-color="#ffff6d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afd095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 fo:padding-bottom="0.15cm" fo:padding-left="0.3cm" fo:padding-right="0.3cm" fo:padding-top="0.15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>
      <style:table-cell-properties fo:background-color="#ffffa6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de8cb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e8cb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order-bottom="0.74pt solid #000000" fo:background-color="#000000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ackground-color="#ffffa6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e6ef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ackground-color="#dee6ef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d7d7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ffd7d7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end" fo:margin-left="0cm"/>
      <style:text-properties fo:font-size="16pt" style:font-size-asian="16pt" style:font-size-complex="16pt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border="0.74pt solid #000000" fo:padding-bottom="0.15cm" fo:padding-left="0.3cm" fo:padding-right="0.3cm" fo:padding-top="0.15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3" style:family="table-cell" style:parent-style-name="Default">
      <style:table-cell-properties fo:background-color="#dee6ef" style:text-align-source="fix" style:repeat-content="false" fo:padding-bottom="0.15cm" fo:padding-left="0.3cm" fo:padding-right="0.3cm" fo:padding-top="0.15cm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fo:background-color="#dee6ef" style:text-align-source="fix" style:repeat-content="false" fo:padding-bottom="0.15cm" fo:padding-left="0.3cm" fo:padding-right="0.3cm" fo:padding-top="0.15cm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hain Visibility" table:style-name="ta1" table:print-ranges="'Chain Visibility'.B3:'Chain Visibility'.I13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7"/>
        <table:table-column table:style-name="co3" table:number-columns-repeated="5" table:default-cell-style-name="ce10"/>
        <table:table-column table:style-name="co1" table:number-columns-repeated="2" table:default-cell-style-name="ce1"/>
        <table:table-column table:style-name="co4" table:number-columns-repeated="1013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- Visibility of Chains Within Each Table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table:formula="of:=[$'Targets Permitted - Format 1'.C3]" office:value-type="string" office:string-value="v 0.3" calcext:value-type="string">
            <text:p>v 0.3</text:p>
          </table:table-cell>
          <table:table-cell table:style-name="ce9" table:number-columns-repeated="5"/>
          <table:table-cell table:style-name="ce58" table:formula="of:=[$'Targets Permitted - Format 1'.I3]" office:value-type="string" office:string-value="E. Marceau – 2026-07-09" calcext:value-type="string">
            <text:p>E. Marceau – 2026-07-09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4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53"/>
          <table:table-cell table:number-columns-repeated="1015"/>
        </table:table-row>
        <table:table-row table:style-name="ro3">
          <table:table-cell table:number-columns-repeated="2"/>
          <table:table-cell table:style-name="ce4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number-columns-repeated="1015"/>
        </table:table-row>
        <table:table-row table:style-name="ro3">
          <table:table-cell/>
          <table:table-cell table:style-name="ce36" office:value-type="string" calcext:value-type="string" table:number-columns-spanned="1" table:number-rows-spanned="5">
            <text:p>↞ <text:s text:c="2"/>Chain <text:s text:c="2"/>↠</text:p>
          </table:table-cell>
          <table:table-cell table:style-name="ce51" office:value-type="string" calcext:value-type="string">
            <text:p>PREROUTING</text:p>
          </table:table-cell>
          <table:table-cell table:number-columns-repeated="3" table:style-name="ce56" office:value-type="string" calcext:value-type="string">
            <text:p>Access</text:p>
          </table:table-cell>
          <table:table-cell table:style-name="ce57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3">
          <table:table-cell/>
          <table:covered-table-cell/>
          <table:table-cell table:style-name="ce51" office:value-type="string" calcext:value-type="string">
            <text:p>INPUT</text:p>
          </table:table-cell>
          <table:table-cell table:style-name="ce57"/>
          <table:table-cell table:number-columns-repeated="4" table:style-name="ce5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FORWARD</text:p>
          </table:table-cell>
          <table:table-cell table:style-name="ce57"/>
          <table:table-cell table:style-name="ce56" office:value-type="string" calcext:value-type="string">
            <text:p>Access</text:p>
          </table:table-cell>
          <table:table-cell table:style-name="ce57"/>
          <table:table-cell table:number-columns-repeated="2" table:style-name="ce5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OUTPUT</text:p>
          </table:table-cell>
          <table:table-cell table:number-columns-repeated="5" table:style-name="ce5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POSTROUTING</text:p>
          </table:table-cell>
          <table:table-cell table:style-name="ce57"/>
          <table:table-cell table:number-columns-repeated="2" table:style-name="ce56" office:value-type="string" calcext:value-type="string">
            <text:p>Access</text:p>
          </table:table-cell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85">
          <table:table-cell table:number-columns-repeated="1023"/>
        </table:table-row>
        <table:table-row table:style-name="ro4" table:number-rows-repeated="7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EJECT or DROP" table:style-name="ta1" table:print-ranges="'REJECT or DROP'.B3:'REJECT or DROP'.I13">
        <table:table-column table:style-name="co1" table:number-columns-repeated="2" table:default-cell-style-name="ce1"/>
        <table:table-column table:style-name="co2" table:default-cell-style-name="ce37"/>
        <table:table-column table:style-name="co3" table:number-columns-repeated="5" table:default-cell-style-name="ce10"/>
        <table:table-column table:style-name="co1" table:number-columns-repeated="2" table:default-cell-style-name="ce1"/>
        <table:table-column table:style-name="co4" table:number-columns-repeated="1013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- Allowed use of REJECT and DROP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table:formula="of:=[$'Targets Permitted - Format 1'.C3]" office:value-type="string" office:string-value="v 0.3" calcext:value-type="string">
            <text:p>v 0.3</text:p>
          </table:table-cell>
          <table:table-cell table:style-name="ce9" table:number-columns-repeated="5"/>
          <table:table-cell table:style-name="ce58" table:formula="of:=[$'Targets Permitted - Format 1'.I3]" office:value-type="string" office:string-value="E. Marceau – 2026-07-09" calcext:value-type="string">
            <text:p>E. Marceau – 2026-07-09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4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9"/>
          <table:table-cell table:number-columns-repeated="1015"/>
        </table:table-row>
        <table:table-row table:style-name="ro3">
          <table:table-cell table:number-columns-repeated="2"/>
          <table:table-cell table:style-name="ce4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number-columns-repeated="1015"/>
        </table:table-row>
        <table:table-row table:style-name="ro3">
          <table:table-cell/>
          <table:table-cell table:style-name="ce36" office:value-type="string" calcext:value-type="string" table:number-columns-spanned="1" table:number-rows-spanned="5">
            <text:p>↞ <text:s text:c="2"/>Chain <text:s text:c="2"/>↠</text:p>
          </table:table-cell>
          <table:table-cell table:style-name="ce51" office:value-type="string" calcext:value-type="string">
            <text:p>PREROUTING</text:p>
          </table:table-cell>
          <table:table-cell table:number-columns-repeated="3" table:style-name="ce59" office:value-type="string" calcext:value-type="string">
            <text:p>DROP</text:p>
          </table:table-cell>
          <table:table-cell table:style-name="ce57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3">
          <table:table-cell/>
          <table:covered-table-cell/>
          <table:table-cell table:style-name="ce51" office:value-type="string" calcext:value-type="string">
            <text:p>INPUT</text:p>
          </table:table-cell>
          <table:table-cell table:style-name="ce57"/>
          <table:table-cell table:number-columns-repeated="2" table:style-name="ce59" office:value-type="string" calcext:value-type="string">
            <text:p>DROP</text:p>
          </table:table-cell>
          <table:table-cell table:style-name="ce60" office:value-type="string" calcext:value-type="string">
            <text:p>REJECT / DROP</text:p>
          </table:table-cell>
          <table:table-cell table:style-name="ce59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FORWARD</text:p>
          </table:table-cell>
          <table:table-cell table:style-name="ce57"/>
          <table:table-cell table:style-name="ce59" office:value-type="string" calcext:value-type="string">
            <text:p>DROP</text:p>
          </table:table-cell>
          <table:table-cell table:style-name="ce57"/>
          <table:table-cell table:style-name="ce60" office:value-type="string" calcext:value-type="string">
            <text:p>REJECT / DROP</text:p>
          </table:table-cell>
          <table:table-cell table:style-name="ce59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OUTPUT</text:p>
          </table:table-cell>
          <table:table-cell table:number-columns-repeated="3" table:style-name="ce59" office:value-type="string" calcext:value-type="string">
            <text:p>DROP</text:p>
          </table:table-cell>
          <table:table-cell table:style-name="ce60" office:value-type="string" calcext:value-type="string">
            <text:p>REJECT / DROP</text:p>
          </table:table-cell>
          <table:table-cell table:style-name="ce59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POSTROUTING</text:p>
          </table:table-cell>
          <table:table-cell table:style-name="ce57"/>
          <table:table-cell table:number-columns-repeated="2" table:style-name="ce59" office:value-type="string" calcext:value-type="string">
            <text:p>DROP</text:p>
          </table:table-cell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85">
          <table:table-cell table:number-columns-repeated="1023"/>
        </table:table-row>
        <table:table-row table:style-name="ro4" table:number-rows-repeated="7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argets Permitted - Format 1" table:style-name="ta1" table:print-ranges="'Targets Permitted - Format 1'.B2:'Targets Permitted - Format 1'.I80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7"/>
        <table:table-column table:style-name="co3" table:number-columns-repeated="5" table:default-cell-style-name="ce10"/>
        <table:table-column table:style-name="co1" table:number-columns-repeated="2" table:default-cell-style-name="ce1"/>
        <table:table-column table:style-name="co4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Allowed Targets for Chains by Table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string" calcext:value-type="string">
            <text:p>v 0.3</text:p>
          </table:table-cell>
          <table:table-cell table:number-columns-repeated="5"/>
          <table:table-cell table:style-name="ce58" office:value-type="string" calcext:value-type="string">
            <text:p>E. Marceau – 2026-07-09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4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9"/>
          <table:table-cell table:number-columns-repeated="1015"/>
        </table:table-row>
        <table:table-row table:style-name="ro3">
          <table:table-cell table:number-columns-repeated="2"/>
          <table:table-cell table:style-name="ce4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1" table:number-rows-spanned="11">
            <text:p>PREROUTING</text:p>
          </table:table-cell>
          <table:table-cell table:style-name="ce38" office:value-type="string" calcext:value-type="string">
            <text:p>NOTRACK</text:p>
          </table:table-cell>
          <table:table-cell table:style-name="ce45" office:value-type="string" calcext:value-type="string">
            <text:p>MARK</text:p>
          </table:table-cell>
          <table:table-cell table:style-name="ce38" office:value-type="string" calcext:value-type="string">
            <text:p>DNA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REROUTING</text:p>
          </table:covered-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REROUTING</text:p>
          </table:covered-table-cell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REROUTING</text:p>
          </table:covered-table-cell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REROUTING</text:p>
          </table:covered-table-cell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REROUTING</text:p>
          </table:covered-table-cell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REROUTING</text:p>
          </table:covered-table-cell>
          <table:table-cell table:style-name="ce57" table:number-columns-repeated="3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DROP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REROUTING</text:p>
          </table:covered-table-cell>
          <table:table-cell table:number-columns-repeated="3" table:style-name="ce41" office:value-type="string" calcext:value-type="string">
            <text:p>Custom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" table:number-rows-spanned="13">
            <text:p>INPUT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REDIREC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57"/>
          <table:table-cell table:style-name="ce45" office:value-type="string" calcext:value-type="string">
            <text:p>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INPUT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INPUT</text:p>
          </table:covered-table-cell>
          <table:table-cell table:style-name="ce43"/>
          <table:table-cell table:style-name="ce57" table:number-columns-repeated="4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INPUT</text:p>
          </table:covered-table-cell>
          <table:table-cell table:style-name="ce43"/>
          <table:table-cell table:number-columns-repeated="3" table:style-name="ce40" office:value-type="string" calcext:value-type="string">
            <text:p>ACCEPT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INPUT</text:p>
          </table:covered-table-cell>
          <table:table-cell table:style-name="ce43"/>
          <table:table-cell table:number-columns-repeated="3" table:style-name="ce40" office:value-type="string" calcext:value-type="string">
            <text:p>DROP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INPUT</text:p>
          </table:covered-table-cell>
          <table:table-cell table:style-name="ce43"/>
          <table:table-cell table:number-columns-repeated="4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INPUT</text:p>
          </table:covered-table-cell>
          <table:table-cell table:style-name="ce43"/>
          <table:table-cell table:number-columns-repeated="4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" table:number-rows-spanned="16">
            <text:p>FORWARD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2"/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3"/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43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CPMSS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ECN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57"/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QUEUE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FORWARD</text:p>
          </table:covered-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43"/>
          <table:table-cell table:number-columns-repeated="2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" table:number-rows-spanned="16">
            <text:p>OUTPUT</text:p>
          </table:table-cell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style-name="ce38" office:value-type="string" calcext:value-type="string">
            <text:p>CT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5" office:value-type="string" calcext:value-type="string">
            <text:p>AUDIT</text:p>
          </table:table-cell>
          <table:table-cell table:style-name="ce45" office:value-type="string" calcext:value-type="string">
            <text:p>REJECT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2" table:style-name="ce38" office:value-type="string" calcext:value-type="string">
            <text:p>LOG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style-name="ce57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2" table:style-name="ce38" office:value-type="string" calcext:value-type="string">
            <text:p>ULOG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2" table:style-name="ce38" office:value-type="string" calcext:value-type="string">
            <text:p>NFLOG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style-name="ce57" table:number-columns-repeated="5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number-columns-repeated="5" table:style-name="ce40" office:value-type="string" calcext:value-type="string">
            <text:p>ACCEPT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number-columns-repeated="2" table:style-name="ce40" office:value-type="string" calcext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number-columns-repeated="5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OUTPUT</text:p>
          </table:covered-table-cell>
          <table:table-cell table:number-columns-repeated="2" table:style-name="ce41" office:value-type="string" calcext:value-type="string">
            <text:p>Custom</text:p>
          </table:table-cell>
          <table:table-cell table:style-name="ce57"/>
          <table:table-cell table:number-columns-repeated="2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" table:number-rows-spanned="18">
            <text:p>POSTROUTING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57" table:number-columns-repeated="2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POSTROUTING</text:p>
          </table:covered-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 table:number-rows-repeated="1048494">
          <table:table-cell table:number-columns-repeated="1023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argets Permitted - Format 2" table:style-name="ta1" table:print-ranges="'Targets Permitted - Format 2'.B117:'Targets Permitted - Format 2'.I194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7"/>
        <table:table-column table:style-name="co5" table:number-columns-repeated="5" table:default-cell-style-name="ce10"/>
        <table:table-column table:style-name="co5" table:number-columns-repeated="6" table:default-cell-style-name="ce1"/>
        <table:table-column table:style-name="co4" table:number-columns-repeated="1009" table:default-cell-style-name="ce1"/>
        <table:table-column table:style-name="co4" table:default-cell-style-name="Default"/>
        <table:table-row table:style-name="ro1">
          <table:table-cell table:style-name="Default" table:number-columns-repeated="1023"/>
          <table:table-cell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9" table:formula="of:=[$'Targets Permitted - Format 1'.C3]" office:value-type="string" office:string-value="v 0.3" calcext:value-type="string">
            <text:p>v 0.3</text:p>
          </table:table-cell>
          <table:table-cell table:number-columns-repeated="5"/>
          <table:table-cell table:style-name="ce58" table:formula="of:=[$'Targets Permitted - Format 1'.I3]" office:value-type="string" office:string-value="E. Marceau – 2026-07-09" calcext:value-type="string">
            <text:p>E. Marceau – 2026-07-0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PREROUTING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PREROUTING</text:p>
          </table:table-cell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2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style-name="ce57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number-columns-repeated="3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number-columns-repeated="3" table:style-name="ce40" office:value-type="string" calcext:value-type="string">
            <text:p>DROP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number-columns-repeated="3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PREROUTING</text:p>
          </table:table-cell>
          <table:table-cell table:number-columns-repeated="3" table:style-name="ce41" office:value-type="string" calcext:value-type="string">
            <text:p>Custom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INPUT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INPUT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REDIREC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57"/>
          <table:table-cell table:style-name="ce45" office:value-type="string" calcext:value-type="string">
            <text:p>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style-name="ce57" table:number-columns-repeated="4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number-columns-repeated="3" table:style-name="ce40" office:value-type="string" calcext:value-type="string">
            <text:p>ACCEPT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number-columns-repeated="3" table:style-name="ce40" office:value-type="string" calcext:value-type="string">
            <text:p>DROP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number-columns-repeated="4" table:style-name="ce40" office:value-type="string" calcext:value-type="string">
            <text:p>RETURN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INPUT</text:p>
          </table:table-cell>
          <table:table-cell table:style-name="ce43"/>
          <table:table-cell table:number-columns-repeated="4" table:style-name="ce41" office:value-type="string" calcext:value-type="string">
            <text:p>Custo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FORWARD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FORWARD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2"/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3"/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43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TCPMSS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5" office:value-type="string" calcext:value-type="string">
            <text:p>ECN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57"/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57"/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57"/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0" office:value-type="string" calcext:value-type="string">
            <text:p>QUEUE</text:p>
          </table:table-cell>
          <table:table-cell table:style-name="ce43"/>
          <table:table-cell table:style-name="ce57" table:number-columns-repeated="2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FORWARD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43"/>
          <table:table-cell table:number-columns-repeated="2" table:style-name="ce41" office:value-type="string" calcext:value-type="string">
            <text:p>Custo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OUTPUT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OUTPUT</text:p>
          </table:table-cell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38" office:value-type="string" calcext:value-type="string">
            <text:p>CT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5" office:value-type="string" calcext:value-type="string">
            <text:p>AUDIT</text:p>
          </table:table-cell>
          <table:table-cell table:style-name="ce45" office:value-type="string" calcext:value-type="string">
            <text:p>REJECT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2" table:style-name="ce38" office:value-type="string" calcext:value-type="string">
            <text:p>LOG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2" table:style-name="ce38" office:value-type="string" calcext:value-type="string">
            <text:p>ULOG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2" table:style-name="ce38" office:value-type="string" calcext:value-type="string">
            <text:p>NFLOG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 table:number-columns-repeated="5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 table:number-columns-repeated="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OUTPUT</text:p>
          </table:table-cell>
          <table:table-cell table:style-name="ce57" table:number-columns-repeated="5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OUTPUT</text:p>
          </table:table-cell>
          <table:table-cell table:number-columns-repeated="5" table:style-name="ce40" office:value-type="string" calcext:value-type="string">
            <text:p>ACCEPT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OUTPUT</text:p>
          </table:table-cell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number-columns-repeated="2" table:style-name="ce40" office:value-type="string" calcext:value-type="string">
            <text:p>DROP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OUTPUT</text:p>
          </table:table-cell>
          <table:table-cell table:number-columns-repeated="5" table:style-name="ce40" office:value-type="string" calcext:value-type="string">
            <text:p>RETURN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OUTPUT</text:p>
          </table:table-cell>
          <table:table-cell table:number-columns-repeated="2" table:style-name="ce41" office:value-type="string" calcext:value-type="string">
            <text:p>Custom</text:p>
          </table:table-cell>
          <table:table-cell table:style-name="ce57"/>
          <table:table-cell table:number-columns-repeated="2" table:style-name="ce41" office:value-type="string" calcext:value-type="string">
            <text:p>Custo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10" table:number-columns-repeated="1015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POSTROUTING</text:p>
          </table:table-cell>
          <table:table-cell table:style-name="ce10" table:number-columns-repeated="1015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POSTROUTING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style-name="ce42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57" table:number-columns-repeated="2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POSTROUTING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style-name="ce43" table:number-columns-repeated="2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9" table:formula="of:=[$'Targets Permitted - Format 1'.C3]" office:value-type="string" office:string-value="v 0.3" calcext:value-type="string">
            <text:p>v 0.3</text:p>
          </table:table-cell>
          <table:table-cell table:number-columns-repeated="5"/>
          <table:table-cell table:style-name="ce58" table:formula="of:=[$'Targets Permitted - Format 1'.I3]" office:value-type="string" office:string-value="E. Marceau – 2026-07-09" calcext:value-type="string">
            <text:p>E. Marceau – 2026-07-0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number-columns-repeated="2"/>
          <table:table-cell table:style-name="ce63" office:value-type="string" calcext:value-type="string">
            <text:p>Packet Destination: Local Host (Client Process)</text:p>
          </table:table-cell>
          <table:table-cell table:style-name="ce64" table:number-columns-repeated="8"/>
          <table:table-cell table:number-columns-repeated="1013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42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2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3" table:style-name="ce55" office:value-type="string" calcext:value-type="string">
            <text:p>PREROUTING</text:p>
          </table:table-cell>
          <table:table-cell table:style-name="ce42"/>
          <table:table-cell table:number-columns-repeated="4" table:style-name="ce55" office:value-type="string" calcext:value-type="string">
            <text:p>INPUT</text:p>
          </table:table-cell>
          <table:table-cell table:style-name="ce10" table:number-columns-repeated="101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4" office:value-type="string" calcext:value-type="string">
            <text:p>REDIRECT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QUEUE</text:p>
          </table:table-cell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LOG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38" office:value-type="string" calcext:value-type="string">
            <text:p>NFLOG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38" office:value-type="string" calcext:value-type="string">
            <text:p>TRACE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57"/>
          <table:table-cell table:style-name="ce40" office:value-type="string" calcext:value-type="string">
            <text:p>ACCEPT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DROP</text:p>
          </table:table-cell>
          <table:table-cell table:style-name="ce43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style-name="ce40" office:value-type="string" calcext:value-type="string">
            <text:p>DROP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4" table:style-name="ce40" office:value-type="string" calcext:value-type="string">
            <text:p>RETURN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9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number-columns-repeated="4" table:style-name="ce41" office:value-type="string" calcext:value-type="string">
            <text:p>Custom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number-columns-repeated="2"/>
          <table:table-cell table:style-name="ce63" office:value-type="string" calcext:value-type="string">
            <text:p>Packet Destination: Local Host Sending to Remote</text:p>
          </table:table-cell>
          <table:table-cell table:style-name="ce64" table:number-columns-repeated="5"/>
          <table:table-cell table:style-name="ce58"/>
          <table:table-cell table:number-columns-repeated="1015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2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OUTPUT</text:p>
          </table:table-cell>
          <table:table-cell table:style-name="ce43"/>
          <table:table-cell table:number-columns-repeated="2" table:style-name="ce55" office:value-type="string" calcext:value-type="string">
            <text:p>POSTROUTING</text:p>
          </table:table-cell>
          <table:table-cell table:style-name="ce10" table:number-columns-repeated="101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8" office:value-type="string" calcext:value-type="string">
            <text:p>CT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5" office:value-type="string" calcext:value-type="string">
            <text:p>AUDIT</text:p>
          </table:table-cell>
          <table:table-cell table:style-name="ce45" office:value-type="string" calcext:value-type="string">
            <text:p>REJECT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2" table:style-name="ce38" office:value-type="string" calcext:value-type="string">
            <text:p>LOG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57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2" table:style-name="ce38" office:value-type="string" calcext:value-type="string">
            <text:p>ULOG</text:p>
          </table:table-cell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2" table:style-name="ce38" office:value-type="string" calcext:value-type="string">
            <text:p>NFLOG</text:p>
          </table:table-cell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9"/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9"/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9"/>
          <table:table-cell table:style-name="ce57" table:number-columns-repeated="5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9"/>
          <table:table-cell table:style-name="ce57" table:number-columns-repeated="5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9"/>
          <table:table-cell table:style-name="ce57" table:number-columns-repeated="5"/>
          <table:table-cell table:style-name="ce43"/>
          <table:table-cell table:style-name="ce57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39"/>
          <table:table-cell table:number-columns-repeated="5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9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number-columns-repeated="2" table:style-name="ce40" office:value-type="string" calcext:value-type="string">
            <text:p>DROP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9"/>
          <table:table-cell table:number-columns-repeated="5"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9"/>
          <table:table-cell table:number-columns-repeated="2" table:style-name="ce41" office:value-type="string" calcext:value-type="string">
            <text:p>Custom</text:p>
          </table:table-cell>
          <table:table-cell table:style-name="ce57"/>
          <table:table-cell table:number-columns-repeated="2" table:style-name="ce41" office:value-type="string" calcext:value-type="string">
            <text:p>Custom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11" table:number-rows-spanned="1">
            <text:p>Packet Destination: Passing Thru To Another Host</text:p>
          </table:table-cell>
          <table:covered-table-cell table:number-columns-repeated="10" table:style-name="ce64"/>
          <table:table-cell table:number-columns-repeated="1011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0"/>
          <table:table-cell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3" table:style-name="ce55" office:value-type="string" calcext:value-type="string">
            <text:p>PREROUTING</text:p>
          </table:table-cell>
          <table:table-cell table:style-name="ce43"/>
          <table:table-cell table:number-columns-repeated="3" table:style-name="ce55" office:value-type="string" calcext:value-type="string">
            <text:p>FORWARD</text:p>
          </table:table-cell>
          <table:table-cell table:style-name="ce43"/>
          <table:table-cell table:number-columns-repeated="2" table:style-name="ce55" office:value-type="string" calcext:value-type="string">
            <text:p>POSTROUTING</text:p>
          </table:table-cell>
          <table:table-cell table:style-name="ce10" table:number-columns-repeated="101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LOG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38" office:value-type="string" calcext:value-type="string">
            <text:p>TRACE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/>
          <table:table-cell table:style-name="ce45" office:value-type="string" calcext:value-type="string">
            <text:p>TCPMSS</text:p>
          </table:table-cell>
          <table:table-cell table:style-name="ce57" table:number-columns-repeated="2"/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/>
          <table:table-cell table:style-name="ce45" office:value-type="string" calcext:value-type="string">
            <text:p>ECN</text:p>
          </table:table-cell>
          <table:table-cell table:style-name="ce57" table:number-columns-repeated="2"/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9"/>
          <table:table-cell table:style-name="ce57" table:number-columns-repeated="3"/>
          <table:table-cell table:style-name="ce43"/>
          <table:table-cell table:style-name="ce40" office:value-type="string" calcext:value-type="string">
            <text:p>QUEUE</text:p>
          </table:table-cell>
          <table:table-cell table:style-name="ce57" table:number-columns-repeated="2"/>
          <table:table-cell table:style-name="ce43"/>
          <table:table-cell table:style-name="ce57" table:number-columns-repeated="2"/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57"/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DROP</text:p>
          </table:table-cell>
          <table:table-cell table:style-name="ce43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9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9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number-columns-repeated="1011"/>
        </table:table-row>
        <table:table-row table:style-name="ro1" table:number-rows-repeated="2">
          <table:table-cell table:style-name="Default" table:number-columns-repeated="1023"/>
          <table:table-cell/>
        </table:table-row>
        <table:table-row table:style-name="ro1" table:number-rows-repeated="3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1" table:number-rows-repeated="1048264">
          <table:table-cell table:number-columns-repeated="1024"/>
        </table:table-row>
        <table:table-row table:style-name="ro4" table:number-rows-repeated="1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cal Host - Incoming Flow" table:style-name="ta1" table:print-ranges="'Local Host - Incoming Flow'.B2:'Local Host - Incoming Flow'.L23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7"/>
        <table:table-column table:style-name="co5" table:number-columns-repeated="5" table:default-cell-style-name="ce10"/>
        <table:table-column table:style-name="co5" table:number-columns-repeated="3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4" table:number-columns-repeated="1009" table:default-cell-style-name="ce1"/>
        <table:table-column table:style-name="co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9" table:formula="of:=[$'Targets Permitted - Format 1'.C3]" office:value-type="string" office:string-value="v 0.3" calcext:value-type="string">
            <text:p>v 0.3</text:p>
          </table:table-cell>
          <table:table-cell table:number-columns-repeated="5"/>
          <table:table-cell table:style-name="ce58" table:formula="of:=[$'Targets Permitted - Format 1'.I3]" office:value-type="string" office:string-value="E. Marceau – 2026-07-09" calcext:value-type="string">
            <text:p>E. Marceau – 2026-07-0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number-columns-repeated="2"/>
          <table:table-cell table:style-name="ce63" office:value-type="string" calcext:value-type="string">
            <text:p>Packet Destination: Local Host (Client Process)</text:p>
          </table:table-cell>
          <table:table-cell table:style-name="ce64" table:number-columns-repeated="8"/>
          <table:table-cell table:number-columns-repeated="1013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42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2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3" table:style-name="ce55" office:value-type="string" calcext:value-type="string">
            <text:p>PREROUTING</text:p>
          </table:table-cell>
          <table:table-cell table:style-name="ce42"/>
          <table:table-cell table:number-columns-repeated="4" table:style-name="ce55" office:value-type="string" calcext:value-type="string">
            <text:p>INPUT</text:p>
          </table:table-cell>
          <table:table-cell table:style-name="ce10" table:number-columns-repeated="1012"/>
          <table:table-cell table:style-name="ce34"/>
        </table:table-row>
        <table:table-row table:style-name="ro1">
          <table:table-cell table:style-name="ce10"/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4" office:value-type="string" calcext:value-type="string">
            <text:p>REDIRECT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QUEUE</text:p>
          </table:table-cell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LOG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38" office:value-type="string" calcext:value-type="string">
            <text:p>NFLOG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38" office:value-type="string" calcext:value-type="string">
            <text:p>TRACE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3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4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57"/>
          <table:table-cell table:style-name="ce40" office:value-type="string" calcext:value-type="string">
            <text:p>ACCEPT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0" office:value-type="string" calcext:value-type="string">
            <text:p>DROP</text:p>
          </table:table-cell>
          <table:table-cell table:style-name="ce43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style-name="ce40" office:value-type="string" calcext:value-type="string">
            <text:p>DROP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4" table:style-name="ce40" office:value-type="string" calcext:value-type="string">
            <text:p>RETURN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number-columns-repeated="4" table:style-name="ce41" office:value-type="string" calcext:value-type="string">
            <text:p>Custom</text:p>
          </table:table-cell>
          <table:table-cell table:number-columns-repeated="1013"/>
        </table:table-row>
        <table:table-row table:style-name="ro1" table:number-rows-repeated="2">
          <table:table-cell table:style-name="ce10"/>
          <table:table-cell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1" table:number-rows-repeated="4">
          <table:table-cell table:style-name="ce10"/>
          <table:table-cell table:number-columns-repeated="1023"/>
        </table:table-row>
        <table:table-row table:style-name="ro1" table:number-rows-repeated="1048332">
          <table:table-cell table:number-columns-repeated="1024"/>
        </table:table-row>
        <table:table-row table:style-name="ro4" table:number-rows-repeated="2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cal Host - Outgoing Flow" table:style-name="ta1" table:print-ranges="'Local Host - Outgoing Flow'.B2:'Local Host - Outgoing Flow'.L27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7"/>
        <table:table-column table:style-name="co5" table:number-columns-repeated="5" table:default-cell-style-name="ce10"/>
        <table:table-column table:style-name="co5" table:number-columns-repeated="3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4" table:number-columns-repeated="1009" table:default-cell-style-name="ce1"/>
        <table:table-column table:style-name="co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9" table:formula="of:=[$'Targets Permitted - Format 1'.C3]" office:value-type="string" office:string-value="v 0.3" calcext:value-type="string">
            <text:p>v 0.3</text:p>
          </table:table-cell>
          <table:table-cell table:number-columns-repeated="5"/>
          <table:table-cell table:style-name="ce58" table:formula="of:=[$'Targets Permitted - Format 1'.I3]" office:value-type="string" office:string-value="E. Marceau – 2026-07-09" calcext:value-type="string">
            <text:p>E. Marceau – 2026-07-0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3">
          <table:table-cell table:number-columns-repeated="2"/>
          <table:table-cell table:style-name="ce63" office:value-type="string" calcext:value-type="string">
            <text:p>Packet Destination: Local Host Sending to Remote</text:p>
          </table:table-cell>
          <table:table-cell table:style-name="ce64" table:number-columns-repeated="5"/>
          <table:table-cell table:style-name="ce58"/>
          <table:table-cell table:number-columns-repeated="1015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2"/>
          <table:table-cell table:style-name="ce34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5" table:style-name="ce55" office:value-type="string" calcext:value-type="string">
            <text:p>OUTPUT</text:p>
          </table:table-cell>
          <table:table-cell table:style-name="ce43"/>
          <table:table-cell table:number-columns-repeated="2" table:style-name="ce55" office:value-type="string" calcext:value-type="string">
            <text:p>POSTROUTING</text:p>
          </table:table-cell>
          <table:table-cell table:style-name="ce10" table:number-columns-repeated="1012"/>
          <table:table-cell table:style-name="ce34"/>
        </table:table-row>
        <table:table-row table:style-name="ro1">
          <table:table-cell table:style-name="ce10"/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38" office:value-type="string" calcext:value-type="string">
            <text:p>CT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5" office:value-type="string" calcext:value-type="string">
            <text:p>AUDIT</text:p>
          </table:table-cell>
          <table:table-cell table:style-name="ce45" office:value-type="string" calcext:value-type="string">
            <text:p>REJECT</text:p>
          </table: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2" table:style-name="ce38" office:value-type="string" calcext:value-type="string">
            <text:p>LOG</text:p>
          </table: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2" table:style-name="ce38" office:value-type="string" calcext:value-type="string">
            <text:p>ULOG</text:p>
          </table:table-cell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2" table:style-name="ce38" office:value-type="string" calcext:value-type="string">
            <text:p>NFLOG</text:p>
          </table:table-cell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/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5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5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5"/>
          <table:table-cell table:style-name="ce43"/>
          <table:table-cell table:style-name="ce57" table:number-columns-repeated="2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5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number-columns-repeated="2" table:style-name="ce40" office:value-type="string" calcext:value-type="string">
            <text:p>DROP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5"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2" table:style-name="ce41" office:value-type="string" calcext:value-type="string">
            <text:p>Custom</text:p>
          </table:table-cell>
          <table:table-cell table:style-name="ce57"/>
          <table:table-cell table:number-columns-repeated="2" table:style-name="ce41" office:value-type="string" calcext:value-type="string">
            <text:p>Custom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10"/>
          <table:table-cell/>
          <table:table-cell table:style-name="ce39"/>
          <table:table-cell table:number-columns-repeated="5"/>
          <table:table-cell table:style-name="ce58"/>
          <table:table-cell table:number-columns-repeated="1015"/>
        </table:table-row>
        <table:table-row table:style-name="ro1" table:number-rows-repeated="1048335">
          <table:table-cell table:number-columns-repeated="1024"/>
        </table:table-row>
        <table:table-row table:style-name="ro4" table:number-rows-repeated="2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low Forwarded to Peer" table:style-name="ta1" table:print-ranges="'Flow Forwarded to Peer'.B2:'Flow Forwarded to Peer'.N27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7"/>
        <table:table-column table:style-name="co5" table:number-columns-repeated="5" table:default-cell-style-name="ce10"/>
        <table:table-column table:style-name="co5" table:number-columns-repeated="5" table:default-cell-style-name="ce1"/>
        <table:table-column table:style-name="co1" table:default-cell-style-name="ce1"/>
        <table:table-column table:style-name="co4" table:number-columns-repeated="1009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Packet Destination Flow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table:formula="of:=[$'Targets Permitted - Format 1'.C3]" office:value-type="string" office:string-value="v 0.3" calcext:value-type="string">
            <text:p>v 0.3</text:p>
          </table:table-cell>
          <table:table-cell table:number-columns-repeated="5"/>
          <table:table-cell table:style-name="ce58" table:formula="of:=[$'Targets Permitted - Format 1'.I3]" office:value-type="string" office:string-value="E. Marceau – 2026-07-09" calcext:value-type="string">
            <text:p>E. Marceau – 2026-07-0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11" table:number-rows-spanned="1">
            <text:p>Packet Destination: Passing Thru To Peer Host</text:p>
          </table:table-cell>
          <table:covered-table-cell table:number-columns-repeated="10" table:style-name="ce64"/>
          <table:table-cell table:number-columns-repeated="1010"/>
        </table:table-row>
        <table:table-row table:style-name="ro3">
          <table:table-cell table:number-columns-repeated="3"/>
          <table:table-cell table:style-name="ce37"/>
          <table:table-cell table:style-name="ce9" table:number-columns-repeated="4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Table <text:s text:c="2"/>↠</text:p>
          </table:table-cell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style-name="ce43"/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10" table:number-columns-repeated="1010"/>
        </table:table-row>
        <table:table-row table:style-name="ro3">
          <table:table-cell table:style-name="ce10" table:number-columns-repeated="2"/>
          <table:table-cell table:style-name="ce32" office:value-type="string" calcext:value-type="string">
            <text:p>Chain <text:s text:c="2"/>↠</text:p>
          </table:table-cell>
          <table:table-cell table:number-columns-repeated="3" table:style-name="ce55" office:value-type="string" calcext:value-type="string">
            <text:p>PREROUTING</text:p>
          </table:table-cell>
          <table:table-cell table:style-name="ce43"/>
          <table:table-cell table:number-columns-repeated="3" table:style-name="ce55" office:value-type="string" calcext:value-type="string">
            <text:p>FORWARD</text:p>
          </table:table-cell>
          <table:table-cell table:style-name="ce43"/>
          <table:table-cell table:number-columns-repeated="2" table:style-name="ce55" office:value-type="string" calcext:value-type="string">
            <text:p>POSTROUTING</text:p>
          </table:table-cell>
          <table:table-cell table:style-name="ce10"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style-name="ce43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LOG</text:p>
          </table:table-cell>
          <table:table-cell table:style-name="ce57"/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38" office:value-type="string" calcext:value-type="string">
            <text:p>TRACE</text:p>
          </table:table-cell>
          <table:table-cell table:style-name="ce57"/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/>
          <table:table-cell table:style-name="ce45" office:value-type="string" calcext:value-type="string">
            <text:p>TCPMSS</text:p>
          </table:table-cell>
          <table:table-cell table:style-name="ce57" table:number-columns-repeated="2"/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/>
          <table:table-cell table:style-name="ce45" office:value-type="string" calcext:value-type="string">
            <text:p>ECN</text:p>
          </table:table-cell>
          <table:table-cell table:style-name="ce57" table:number-columns-repeated="2"/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2"/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57" table:number-columns-repeated="3"/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style-name="ce57" table:number-columns-repeated="3"/>
          <table:table-cell table:style-name="ce43"/>
          <table:table-cell table:style-name="ce40" office:value-type="string" calcext:value-type="string">
            <text:p>QUEUE</text:p>
          </table:table-cell>
          <table:table-cell table:style-name="ce57" table:number-columns-repeated="2"/>
          <table:table-cell table:style-name="ce43"/>
          <table:table-cell table:style-name="ce57" table:number-columns-repeated="2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0" office:value-type="string" calcext:value-type="string">
            <text:p>ACCEPT</text:p>
          </table: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57"/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0" office:value-type="string" calcext:value-type="string">
            <text:p>DROP</text:p>
          </table:table-cell>
          <table:table-cell table:style-name="ce43"/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3"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0"/>
        </table:table-row>
        <table:table-row table:style-name="ro1">
          <table:table-cell table:style-name="ce10"/>
          <table:table-cell/>
          <table:table-cell table:style-name="ce39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number-columns-repeated="3" table:style-name="ce41" office:value-type="string" calcext:value-type="string">
            <text:p>Custom</text:p>
          </table: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39"/>
          <table:table-cell table:number-columns-repeated="5"/>
          <table:table-cell table:style-name="ce58"/>
          <table:table-cell table:number-columns-repeated="1014"/>
        </table:table-row>
        <table:table-row table:style-name="ro1" table:number-rows-repeated="1048334">
          <table:table-cell table:number-columns-repeated="1023"/>
        </table:table-row>
        <table:table-row table:style-name="ro4" table:number-rows-repeated="21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3.18cm" fo:page-height="27.94cm" style:num-format="1" style:print-orientation="landscape" fo:margin-top="1.3cm" fo:margin-bottom="2cm" fo:margin-left="1.3cm" fo:margin-right="1.3cm" style:scale-to="9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09T22:41:59.351202118</dc:date>
    <dc:creator>Eric Marceau</dc:creator>
    <meta:editing-duration>PT6H35M9S</meta:editing-duration>
    <meta:editing-cycles>71</meta:editing-cycles>
    <meta:generator>LibreOffice/7.3.4.2$Linux_X86_64 LibreOffice_project/728fec16bd5f605073805c3c9e7c4212a0120dc5</meta:generator>
    <meta:document-statistic meta:table-count="7" meta:cell-count="1268" meta:object-count="0"/>
  </office:meta>
</office:document-meta>
</file>