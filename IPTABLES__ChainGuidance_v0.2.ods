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3cm" fo:padding-right="0.3cm" fo:padding-top="0.15cm" style:vertical-align="middle"/>
    </style:style>
    <style:style style:name="ce35" style:family="table-cell" style:parent-style-name="Default">
      <style:table-cell-properties fo:background-color="#b4c7dc" style:text-align-source="fix" style:repeat-content="false" fo:padding-bottom="0.15cm" fo:padding-left="0.3cm" fo:padding-right="0.3cm" fo:padding-top="0.15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-bottom="0.15cm" fo:padding-left="0.3cm" fo:padding-right="0.3cm" fo:padding-top="0.15cm" style:rotation-angle="90" style:vertical-align="middl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15cm" fo:padding-left="0.3cm" fo:padding-right="0.3cm" fo:padding-top="0.15cm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center" fo:margin-left="0cm"/>
    </style:style>
    <style:style style:name="ce9" style:family="table-cell" style:parent-style-name="Default">
      <style:table-cell-properties fo:padding-bottom="0.15cm" fo:padding-left="0.3cm" fo:padding-right="0.3cm" fo:padding-top="0.15cm"/>
    </style:style>
    <style:style style:name="ce54" style:family="table-cell" style:parent-style-name="Default">
      <style:table-cell-properties style:text-align-source="fix" style:repeat-content="false" fo:padding-bottom="0.15cm" fo:padding-left="0.3cm" fo:padding-right="0.3cm" fo:padding-top="0.15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55" style:family="table-cell" style:parent-style-name="Default">
      <style:table-cell-properties fo:background-color="#b4c7dc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99999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padding-bottom="0.15cm" fo:padding-left="0.3cm" fo:padding-right="0.3cm" fo:padding-top="0.15cm"/>
    </style:style>
    <style:style style:name="ce58" style:family="table-cell" style:parent-style-name="Default">
      <style:table-cell-properties style:text-align-source="fix" style:repeat-content="false" fo:padding-bottom="0.15cm" fo:padding-left="0.3cm" fo:padding-right="0.3cm" fo:padding-top="0.15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#ffff6d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fo:padding-bottom="0.15cm" fo:padding-left="0.3cm" fo:padding-right="0.3cm" fo:padding-top="0.15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ffffa6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000000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ffffa6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ee6ef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 fo:padding-bottom="0.15cm" fo:padding-left="0.3cm" fo:padding-right="0.3cm" fo:padding-top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d7d7" style:text-align-source="fix" style:repeat-content="false" fo:border-left="0.74pt solid #000000" fo:padding-bottom="0.15cm" fo:padding-left="0.3cm" fo:padding-right="0.3cm" fo:padding-top="0.15cm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in Visibility" table:style-name="ta1" table:print-ranges="'Chain Visibility'.B3:'Chain Visibility'.I1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8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Visibility of Chains Within Each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table:formula="of:=[$'Targets Permitted'.C3]" office:value-type="string" office:string-value="v 0.2" calcext:value-type="string">
            <text:p>v 0.2</text:p>
          </table:table-cell>
          <table:table-cell table:style-name="ce9" table:number-columns-repeated="5"/>
          <table:table-cell table:style-name="ce58" table:formula="of:=[$'Targets Permitted'.I3]" office:value-type="string" office:string-value="E. Marceau – 2026-07-07" calcext:value-type="string">
            <text:p>E. Marceau – 2026-07-07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53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6" office:value-type="string" calcext:value-type="string">
            <text:p>Access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4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6" office:value-type="string" calcext:value-type="string">
            <text:p>Access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5" table:style-name="ce56" office:value-type="string" calcext:value-type="string">
            <text:p>Acce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6" office:value-type="string" calcext:value-type="string">
            <text:p>Access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EJECT or DROP" table:style-name="ta1" table:print-ranges="'REJECT or DROP'.B3:'REJECT or DROP'.I1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8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- Allowed use of REJECT and DROP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table:formula="of:=[$'Targets Permitted'.C3]" office:value-type="string" office:string-value="v 0.2" calcext:value-type="string">
            <text:p>v 0.2</text:p>
          </table:table-cell>
          <table:table-cell table:style-name="ce9" table:number-columns-repeated="5"/>
          <table:table-cell table:style-name="ce58" table:formula="of:=[$'Targets Permitted'.I3]" office:value-type="string" office:string-value="E. Marceau – 2026-07-07" calcext:value-type="string">
            <text:p>E. Marceau – 2026-07-07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1" table:number-rows-spanned="5">
            <text:p>↞ <text:s text:c="2"/>Chain <text:s text:c="2"/>↠</text:p>
          </table:table-cell>
          <table:table-cell table:style-name="ce51" office:value-type="string" calcext:value-type="string">
            <text:p>PREROUTING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57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/>
          <table:covered-table-cell/>
          <table:table-cell table:style-name="ce51" office:value-type="string" calcext:value-type="string">
            <text:p>INPUT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FORWARD</text:p>
          </table:table-cell>
          <table:table-cell table:style-name="ce57"/>
          <table:table-cell table:style-name="ce59" office:value-type="string" calcext:value-type="string">
            <text:p>DROP</text:p>
          </table:table-cell>
          <table:table-cell table:style-name="ce57"/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OUTPUT</text:p>
          </table:table-cell>
          <table:table-cell table:number-columns-repeated="3" table:style-name="ce59" office:value-type="string" calcext:value-type="string">
            <text:p>DROP</text:p>
          </table:table-cell>
          <table:table-cell table:style-name="ce60" office:value-type="string" calcext:value-type="string">
            <text:p>REJECT / DROP</text:p>
          </table:table-cell>
          <table:table-cell table:style-name="ce59" office:value-type="string" calcext:value-type="string">
            <text:p>DROP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1" office:value-type="string" calcext:value-type="string">
            <text:p>POSTROUTING</text:p>
          </table:table-cell>
          <table:table-cell table:style-name="ce57"/>
          <table:table-cell table:number-columns-repeated="2" table:style-name="ce59" office:value-type="string" calcext:value-type="string">
            <text:p>DROP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3"/>
        </table:table-row>
        <table:table-row table:style-name="ro4" table:number-rows-repeated="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rgets Permitted" table:style-name="ta1" table:print-ranges="'Targets Permitted'.B2:'Targets Permitted'.I80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7"/>
        <table:table-column table:style-name="co3" table:number-columns-repeated="5" table:default-cell-style-name="ce8"/>
        <table:table-column table:style-name="co1" table:number-columns-repeated="2" table:default-cell-style-name="ce1"/>
        <table:table-column table:style-name="co4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8" table:number-rows-spanned="1">
            <text:p>IPTABLES Guidance – Allowed Targets for Chains by Table</text:p>
          </table:table-cell>
          <table:covered-table-cell table:style-name="Default"/>
          <table:covered-table-cell table:number-columns-repeated="6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v 0.2</text:p>
          </table:table-cell>
          <table:table-cell table:number-columns-repeated="5"/>
          <table:table-cell table:style-name="ce58" office:value-type="string" calcext:value-type="string">
            <text:p>E. Marceau – 2026-07-07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4" office:value-type="string" calcext:value-type="string" table:number-columns-spanned="5" table:number-rows-spanned="1">
            <text:p>↞ <text:s text:c="2"/>Table <text:s text:c="2"/>↠</text:p>
          </table:table-cell>
          <table:covered-table-cell table:number-columns-repeated="4" table:style-name="ce9"/>
          <table:table-cell table:number-columns-repeated="1015"/>
        </table:table-row>
        <table:table-row table:style-name="ro3">
          <table:table-cell table:number-columns-repeated="2"/>
          <table:table-cell table:style-name="ce4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MANGLE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FILTER</text:p>
          </table:table-cell>
          <table:table-cell table:style-name="ce55" office:value-type="string" calcext:value-type="string">
            <text:p>SECUR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" table:number-rows-spanned="11">
            <text:p>PREROUTING</text:p>
          </table:table-cell>
          <table:table-cell table:style-name="ce38" office:value-type="string" calcext:value-type="string">
            <text:p>NOTRACK</text:p>
          </table:table-cell>
          <table:table-cell table:style-name="ce45" office:value-type="string" calcext:value-type="string">
            <text:p>MARK</text:p>
          </table:table-cell>
          <table:table-cell table:style-name="ce38" office:value-type="string" calcext:value-type="string">
            <text:p>DNA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38" office:value-type="string" calcext:value-type="string">
            <text:p>QUEU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57"/>
          <table:table-cell table:style-name="ce38" office:value-type="string" calcext:value-type="string">
            <text:p>ROUTIN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style-name="ce57" table:number-columns-repeated="3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DRO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number-columns-repeated="3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REROUTING</text:p>
          </table:covered-table-cell>
          <table:table-cell table:number-columns-repeated="3" table:style-name="ce41" office:value-type="string" calcext:value-type="string">
            <text:p>Custom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13">
            <text:p>INPUT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REDIREC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57"/>
          <table:table-cell table:style-name="ce45" office:value-type="string" calcext:value-type="string">
            <text:p>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style-name="ce57" table:number-columns-repeated="4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number-columns-repeated="3"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number-columns-repeated="4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INPUT</text:p>
          </table:covered-table-cell>
          <table:table-cell table:style-name="ce43"/>
          <table:table-cell table:number-columns-repeated="4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16">
            <text:p>FORWARD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2"/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43"/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43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TCPMSS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5" office:value-type="string" calcext:value-type="string">
            <text:p>ECN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57"/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QUEUE</text:p>
          </table:table-cell>
          <table:table-cell table:style-name="ce43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43"/>
          <table:table-cell table:style-name="ce40" office:value-type="string" calcext:value-type="string">
            <text:p>ACCEPT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0" office:value-type="string" calcext:value-type="string">
            <text:p>RETURN</text:p>
          </table: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FORWARD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43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16">
            <text:p>OUTPUT</text:p>
          </table:table-cell>
          <table:table-cell table:style-name="ce44" office:value-type="string" calcext:value-type="string">
            <text:p>NOTRACK</text:p>
          </table:table-cell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DNAT</text:p>
          </table:table-cell>
          <table:table-cell table:style-name="ce46" office:value-type="string" calcext:value-type="string">
            <text:p>REJECT</text:p>
          </table:table-cell>
          <table:table-cell table:style-name="ce50" office:value-type="string" calcext:value-type="string">
            <text:p>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38" office:value-type="string" calcext:value-type="string">
            <text:p>CT</text:p>
          </table:table-cell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REDIRECT</text:p>
          </table:table-cell>
          <table:table-cell table:style-name="ce45" office:value-type="string" calcext:value-type="string">
            <text:p>NFQUEUE</text:p>
          </table:table-cell>
          <table:table-cell table:style-name="ce47" office:value-type="string" calcext:value-type="string">
            <text:p>CONNSECMARK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38" office:value-type="string" calcext:value-type="string">
            <text:p>TRACE</text:p>
          </table:table-cell>
          <table:table-cell table:style-name="ce45" office:value-type="string" calcext:value-type="string">
            <text:p>TOS</text:p>
          </table:table-cell>
          <table:table-cell table:style-name="ce57"/>
          <table:table-cell table:style-name="ce45" office:value-type="string" calcext:value-type="string">
            <text:p>AUDIT</text:p>
          </table:table-cell>
          <table:table-cell table:style-name="ce45" office:value-type="string" calcext:value-type="string">
            <text:p>REJEC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DSCP</text:p>
          </table:table-cell>
          <table:table-cell table:style-name="ce57"/>
          <table:table-cell table:number-columns-repeated="2" table:style-name="ce38"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45" office:value-type="string" calcext:value-type="string">
            <text:p>CLASSIFY</text:p>
          </table:table-cell>
          <table:table-cell table:style-name="ce57"/>
          <table:table-cell table:number-columns-repeated="2" table:style-name="ce38" office:value-type="string" calcext:value-type="string">
            <text:p>U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CONNMARK</text:p>
          </table:table-cell>
          <table:table-cell table:style-name="ce57"/>
          <table:table-cell table:number-columns-repeated="2" table:style-name="ce38" office:value-type="string" calcext:value-type="string">
            <text:p>NFLOG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LOG</text:p>
          </table: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38" office:value-type="string" calcext:value-type="string">
            <text:p>TRACE</text:p>
          </table: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/>
          <table:table-cell table:style-name="ce47" office:value-type="string" calcext:value-type="string">
            <text:p>CONNSECMARK</text:p>
          </table:table-cell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style-name="ce57" table:number-columns-repeated="5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ACCEPT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number-columns-repeated="2" table:style-name="ce40" office:value-type="string" calcext:value-type="string">
            <text:p>DROP</text:p>
          </table:table-cell>
          <table:table-cell table:style-name="ce57"/>
          <table:table-cell table:number-columns-repeated="2" table:style-name="ce40" office:value-type="string" calcext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number-columns-repeated="5" table:style-name="ce40"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OUTPUT</text:p>
          </table:covered-table-cell>
          <table:table-cell table:number-columns-repeated="2" table:style-name="ce41" office:value-type="string" calcext:value-type="string">
            <text:p>Custom</text:p>
          </table:table-cell>
          <table:table-cell table:style-name="ce57"/>
          <table:table-cell table:number-columns-repeated="2" table:style-name="ce41" office:value-type="string" calcext:value-type="string">
            <text:p>Cust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18">
            <text:p>POSTROUTING</text:p>
          </table:table-cell>
          <table:table-cell table:style-name="ce42"/>
          <table:table-cell table:style-name="ce46" office:value-type="string" calcext:value-type="string">
            <text:p>MARK</text:p>
          </table:table-cell>
          <table:table-cell table:style-name="ce44" office:value-type="string" calcext:value-type="string">
            <text:p>SNAT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TL</text:p>
          </table:table-cell>
          <table:table-cell table:style-name="ce38" office:value-type="string" calcext:value-type="string">
            <text:p>MASQUERADE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TOS</text:p>
          </table:table-cell>
          <table:table-cell table:style-name="ce38" office:value-type="string" calcext:value-type="string">
            <text:p>NETMAP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DSC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CLASSIFY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5" office:value-type="string" calcext:value-type="string">
            <text:p>SNT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CONN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NF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38" office:value-type="string" calcext:value-type="string">
            <text:p>ULOG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ONNSECMARK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7" office:value-type="string" calcext:value-type="string">
            <text:p>CHECKSU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57" table:number-columns-repeated="2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ACCEPT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0" office:value-type="string" calcext:value-type="string">
            <text:p>DROP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number-columns-repeated="2" table:style-name="ce40" office:value-type="string" calcext:value-type="string">
            <text:p>RETURN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number-columns-repeated="2"/>
          <table:covered-table-cell table:style-name="ce18" office:value-type="string" calcext:value-type="string">
            <text:p>POSTROUTING</text:p>
          </table:covered-table-cell>
          <table:table-cell table:style-name="ce43"/>
          <table:table-cell table:style-name="ce41" office:value-type="string" calcext:value-type="string">
            <text:p>Custom</text:p>
          </table:table-cell>
          <table:table-cell table:style-name="ce57"/>
          <table:table-cell table:style-name="ce43" table:number-columns-repeated="2"/>
          <table:table-cell table:number-columns-repeated="1015"/>
        </table:table-row>
        <table:table-row table:style-name="ro1" table:number-rows-repeated="1048494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0cm" fo:page-height="53cm" style:num-format="1" style:print-orientation="portrait" fo:margin-top="1.3cm" fo:margin-bottom="2cm" fo:margin-left="1.3cm" fo:margin-right="1.3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7T21:52:53.955845456</dc:date>
    <dc:creator>Eric Marceau</dc:creator>
    <meta:editing-duration>PT5H16M32S</meta:editing-duration>
    <meta:editing-cycles>52</meta:editing-cycles>
    <meta:generator>LibreOffice/7.3.4.2$Linux_X86_64 LibreOffice_project/728fec16bd5f605073805c3c9e7c4212a0120dc5</meta:generator>
    <meta:document-statistic meta:table-count="3" meta:cell-count="304" meta:object-count="0"/>
  </office:meta>
</office:document-meta>
</file>